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86cf12">
      <style:table-properties style:width="6.693in" table:align="margins"/>
    </style:style>
    <style:style style:family="table-column" style:name="ac53401">
      <style:table-column-properties style:column-width="6.6930in" style:rel-column-width="65535*"/>
    </style:style>
    <style:style style:family="table-cell" style:name="a9179f9">
      <style:table-cell-properties fo:border-bottom="0.0007in solid #000000" fo:border-left="0.0007in solid #000000" fo:border-right="none" fo:border-top="0.0007in solid #000000" fo:padding="0.0382in"/>
    </style:style>
    <style:style style:family="table-cell" style:name="a6dd45f">
      <style:table-cell-properties fo:border-bottom="0.0007in solid #000000" fo:border-left="0.0007in solid #000000" fo:border-right="none" fo:border-top="none" fo:padding="0.0382in"/>
    </style:style>
    <style:style style:family="table-cell" style:name="a04024f">
      <style:table-cell-properties fo:border="0.0007in solid #000000" fo:padding="0.0382in"/>
      <style:paragraph-properties fo:text-align="end"/>
      <style:text-properties fo:color="#000000" fo:font-size="12.0pt" fo:font-style="italic" fo:font-weight="bold" style:font-name="Arial"/>
    </style:style>
    <style:style style:family="table-cell" style:name="aa0906f">
      <style:table-cell-properties fo:border="0.0007in solid #000000" fo:border-bottom="0.0007in solid #000000" fo:border-top="none" fo:padding="0.0382in"/>
    </style:style>
    <style:style style:family="table-cell" style:name="a39dcf6">
      <style:table-cell-properties fo:border="0.0007in solid #000000" fo:border-bottom="0.0007in solid #000000" fo:border-top="none" fo:padding="0.0382in"/>
      <style:text-properties fo:color="#000000" fo:font-size="6.0pt" style:font-name="Arial"/>
    </style:style>
    <style:style style:family="table" style:name="acd7ef9">
      <style:table-properties style:width="6.693in" table:align="margins"/>
    </style:style>
    <style:style style:family="table-column" style:name="ade2904">
      <style:table-column-properties style:column-width="1.3386in" style:rel-column-width="13107*"/>
    </style:style>
    <style:style style:family="table-cell" style:name="a80c2a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bae8c">
      <style:table-cell-properties fo:border="0.1pt solid #000000" fo:border-bottom="0.0007in solid #000000" fo:border-left="0.0007in solid #000000" fo:border-right="none" fo:border-top="none" fo:padding="0.0382in"/>
    </style:style>
    <style:style style:family="table-cell" style:name="a11545c">
      <style:table-cell-properties fo:border="0.0007in solid #000000" fo:padding="0.0382in"/>
    </style:style>
    <style:style style:family="table-cell" style:name="aacbde3">
      <style:table-cell-properties fo:border="0.0007in solid #000000" fo:border-bottom="0.0007in solid #000000" fo:border-top="none" fo:padding="0.0382in"/>
    </style:style>
    <style:style style:family="table-cell" style:name="a0003d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78ac6a">
      <style:table-cell-properties fo:border="0.1pt solid #000000" fo:border-bottom="0.0007in solid #000000" fo:border-left="0.0007in solid #000000" fo:border-right="none" fo:border-top="none" fo:padding="0.0382in"/>
    </style:style>
    <style:style style:family="table-cell" style:name="a9ab6e8">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d706f3">
      <style:table-cell-properties fo:border="0.1pt solid #000000" fo:border-bottom="0.0007in solid #000000" fo:border-left="0.0007in solid #000000" fo:border-right="none" fo:border-top="none" fo:padding="0.0382in"/>
    </style:style>
    <style:style style:family="table-cell" style:name="a27dc0b">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dd6155">
      <style:table-cell-properties fo:border="0.1pt solid #000000" fo:border-bottom="0.0007in solid #000000" fo:border-left="0.0007in solid #000000" fo:border-right="none" fo:border-top="none" fo:padding="0.0382in"/>
    </style:style>
    <style:style style:family="table-cell" style:name="a9787b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bf2dc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0007b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067e07">
      <style:table-cell-properties fo:border="0.1pt solid #000000"/>
      <style:text-properties fo:color="#000000" fo:font-size="8.0pt" fo:font-weight="bold" style:font-name="Arial"/>
    </style:style>
    <style:style style:family="table-cell" style:name="a9c2156">
      <style:table-cell-properties fo:border="0.1pt solid #000000" fo:border-bottom="0.0007in solid #000000" fo:border-left="0.0007in solid #000000" fo:border-right="none" fo:border-top="none" fo:padding="0.0382in"/>
    </style:style>
    <style:style style:family="table-cell" style:name="a243b7d">
      <style:table-cell-properties fo:border="0.1pt solid #000000" fo:border-bottom="0.0007in solid #000000" fo:border-left="0.0007in solid #000000" fo:border-right="none" fo:border-top="none" fo:padding="0.0382in"/>
    </style:style>
    <style:style style:family="table-cell" style:name="a86eddf">
      <style:table-cell-properties fo:border="0.1pt solid #000000" fo:border-bottom="0.0007in solid #000000" fo:border-left="0.0007in solid #000000" fo:border-right="none" fo:border-top="none" fo:padding="0.0382in"/>
    </style:style>
    <style:style style:family="table-cell" style:name="ae582ce">
      <style:table-cell-properties fo:border="0.1pt solid #000000"/>
    </style:style>
    <style:style style:family="table-cell" style:name="a8d97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a2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760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041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96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e408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a0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13a4">
      <style:table-cell-properties fo:border="0.1pt solid #000000"/>
      <style:text-properties fo:color="#000000" fo:font-size="8.0pt" style:font-name="Arial"/>
    </style:style>
    <style:style style:family="table-cell" style:name="aca7b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014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ae32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398b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f81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48e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c8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7a10d">
      <style:table-cell-properties fo:border="0.1pt solid #000000"/>
      <style:text-properties fo:color="#000000" fo:font-size="8.0pt" style:font-name="Arial"/>
    </style:style>
    <style:style style:family="table-cell" style:name="a3218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b49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38f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f4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c7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367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e8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7516">
      <style:table-cell-properties fo:border="0.1pt solid #000000"/>
      <style:text-properties fo:color="#000000" fo:font-size="8.0pt" style:font-name="Arial"/>
    </style:style>
    <style:style style:family="table-cell" style:name="ab92e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92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bb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17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c02d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17c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47b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7af3">
      <style:table-cell-properties fo:border="0.1pt solid #000000"/>
      <style:text-properties fo:color="#000000" fo:font-size="8.0pt" style:font-name="Arial"/>
    </style:style>
    <style:style style:family="table-cell" style:name="a8720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b49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5a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86a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10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5a6b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a2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d74f">
      <style:table-cell-properties fo:border="0.1pt solid #000000"/>
      <style:text-properties fo:color="#000000" fo:font-size="8.0pt" style:font-name="Arial"/>
    </style:style>
    <style:style style:family="table-cell" style:name="a528c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473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74c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0d9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3f3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00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6669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6349d">
      <style:table-cell-properties fo:border="0.1pt solid #000000"/>
      <style:text-properties fo:color="#000000" fo:font-size="8.0pt" style:font-name="Arial"/>
    </style:style>
    <style:style style:family="table-cell" style:name="a55b4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48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7cbf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60f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0d7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b8fd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86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c368">
      <style:table-cell-properties fo:border="0.1pt solid #000000"/>
      <style:text-properties fo:color="#000000" fo:font-size="8.0pt" style:font-name="Arial"/>
    </style:style>
    <style:style style:family="table-cell" style:name="a77c5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b40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eb5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be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ea6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4e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fe4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eea0">
      <style:table-cell-properties fo:border="0.1pt solid #000000"/>
      <style:text-properties fo:color="#000000" fo:font-size="8.0pt" style:font-name="Arial"/>
    </style:style>
    <style:style style:family="table-cell" style:name="a87e8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6e7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25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868e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7cf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47c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849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dc3ee">
      <style:table-cell-properties fo:border="0.1pt solid #000000"/>
      <style:text-properties fo:color="#000000" fo:font-size="8.0pt" style:font-name="Arial"/>
    </style:style>
    <style:style style:family="table-cell" style:name="aa72c8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c54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a053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ab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8f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8f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fb1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a1001">
      <style:table-cell-properties fo:border="0.1pt solid #000000"/>
      <style:text-properties fo:color="#000000" fo:font-size="8.0pt" style:font-name="Arial"/>
    </style:style>
    <style:style style:family="table-cell" style:name="a3e42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c0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adcd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34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371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7af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da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b2ee2">
      <style:table-cell-properties fo:border="0.1pt solid #000000"/>
      <style:text-properties fo:color="#000000" fo:font-size="8.0pt" style:font-name="Arial"/>
    </style:style>
    <style:style style:family="table-cell" style:name="a1c0e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8a87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96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39b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058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782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21c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903c">
      <style:table-cell-properties fo:border="0.1pt solid #000000"/>
      <style:text-properties fo:color="#000000" fo:font-size="8.0pt" style:font-name="Arial"/>
    </style:style>
    <style:style style:family="table-cell" style:name="a9a0df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a7d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934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20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2b5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e8d1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9a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4efb6">
      <style:table-cell-properties fo:border="0.1pt solid #000000"/>
      <style:text-properties fo:color="#000000" fo:font-size="8.0pt" style:font-name="Arial"/>
    </style:style>
    <style:style style:family="table-cell" style:name="ae38d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db7a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0a4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a3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01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c0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ab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413e">
      <style:table-cell-properties fo:border="0.1pt solid #000000"/>
      <style:text-properties fo:color="#000000" fo:font-size="8.0pt" style:font-name="Arial"/>
    </style:style>
    <style:style style:family="table-cell" style:name="abcb85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2fd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11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5c04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9d1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b8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d9a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95157">
      <style:table-cell-properties fo:border="0.1pt solid #000000"/>
      <style:text-properties fo:color="#000000" fo:font-size="8.0pt" style:font-name="Arial"/>
    </style:style>
    <style:style style:family="table-cell" style:name="a6678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22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b9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833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8f55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695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b1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2196b">
      <style:table-cell-properties fo:border="0.1pt solid #000000"/>
      <style:text-properties fo:color="#000000" fo:font-size="8.0pt" style:font-name="Arial"/>
    </style:style>
    <style:style style:family="table-cell" style:name="a7c2a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49b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641a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e63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050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43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d0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c81e">
      <style:table-cell-properties fo:border="0.1pt solid #000000"/>
      <style:text-properties fo:color="#000000" fo:font-size="8.0pt" style:font-name="Arial"/>
    </style:style>
    <style:style style:family="table-cell" style:name="ae8286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e5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15d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8221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626f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ca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a0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37d99">
      <style:table-cell-properties fo:border="0.1pt solid #000000"/>
      <style:text-properties fo:color="#000000" fo:font-size="8.0pt" style:font-name="Arial"/>
    </style:style>
    <style:style style:family="table-cell" style:name="a4c23a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6bb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279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a5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f3c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a28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55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bbdd">
      <style:table-cell-properties fo:border="0.1pt solid #000000"/>
      <style:text-properties fo:color="#000000" fo:font-size="8.0pt" style:font-name="Arial"/>
    </style:style>
    <style:style style:family="table-cell" style:name="a7a586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34a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88f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af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f2a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b0c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06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8b13">
      <style:table-cell-properties fo:border="0.1pt solid #000000"/>
      <style:text-properties fo:color="#000000" fo:font-size="8.0pt" style:font-name="Arial"/>
    </style:style>
    <style:style style:family="table-cell" style:name="adc914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e4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dca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f1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a2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da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19c0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51da">
      <style:table-cell-properties fo:border="0.1pt solid #000000"/>
      <style:text-properties fo:color="#000000" fo:font-size="8.0pt" style:font-name="Arial"/>
    </style:style>
    <style:style style:family="table-cell" style:name="ae6004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3e2c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41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97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4e3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d86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4b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6198">
      <style:table-cell-properties fo:border="0.1pt solid #000000"/>
      <style:text-properties fo:color="#000000" fo:font-size="8.0pt" style:font-name="Arial"/>
    </style:style>
    <style:style style:family="table-cell" style:name="aeceb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d1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88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12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3d5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da6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ad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36cc">
      <style:table-cell-properties fo:border="0.1pt solid #000000"/>
      <style:text-properties fo:color="#000000" fo:font-size="8.0pt" style:font-name="Arial"/>
    </style:style>
    <style:style style:family="table-cell" style:name="a092e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cef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d0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14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b6c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07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66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6d5a">
      <style:table-cell-properties fo:border="0.1pt solid #000000"/>
      <style:text-properties fo:color="#000000" fo:font-size="8.0pt" style:font-name="Arial"/>
    </style:style>
    <style:style style:family="table-cell" style:name="ad48d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45fa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5d2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b9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54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a5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3613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68df">
      <style:table-cell-properties fo:border="0.1pt solid #000000"/>
      <style:text-properties fo:color="#000000" fo:font-size="8.0pt" style:font-name="Arial"/>
    </style:style>
    <style:style style:family="table-cell" style:name="a29e1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4c7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7f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cef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3770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47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9e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7b0ff">
      <style:table-cell-properties fo:border="0.1pt solid #000000"/>
      <style:text-properties fo:color="#000000" fo:font-size="8.0pt" style:font-name="Arial"/>
    </style:style>
    <style:style style:family="table-cell" style:name="a4010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737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d8d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a08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0c8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80e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999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01b5">
      <style:table-cell-properties fo:border="0.1pt solid #000000"/>
      <style:text-properties fo:color="#000000" fo:font-size="8.0pt" style:font-name="Arial"/>
    </style:style>
    <style:style style:family="table-cell" style:name="abde2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48d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f0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86d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ab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eca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3f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0fa3">
      <style:table-cell-properties fo:border="0.1pt solid #000000"/>
      <style:text-properties fo:color="#000000" fo:font-size="8.0pt" style:font-name="Arial"/>
    </style:style>
    <style:style style:family="table-cell" style:name="aa3a44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4e6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49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41b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5001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1a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37ad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0062">
      <style:table-cell-properties fo:border="0.1pt solid #000000"/>
      <style:text-properties fo:color="#000000" fo:font-size="8.0pt" style:font-name="Arial"/>
    </style:style>
    <style:style style:family="table-cell" style:name="a27a0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0c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a1c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d80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92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ea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54d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396d4">
      <style:table-cell-properties fo:border="0.1pt solid #000000"/>
      <style:text-properties fo:color="#000000" fo:font-size="8.0pt" style:font-name="Arial"/>
    </style:style>
    <style:style style:family="table-cell" style:name="ae26b9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6e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b96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94b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d9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bb2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ca75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1370">
      <style:table-cell-properties fo:border="0.1pt solid #000000"/>
      <style:text-properties fo:color="#000000" fo:font-size="8.0pt" style:font-name="Arial"/>
    </style:style>
    <style:style style:family="table-cell" style:name="ae8071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f6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62c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18b3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a91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d8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865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c895">
      <style:table-cell-properties fo:border="0.1pt solid #000000"/>
      <style:text-properties fo:color="#000000" fo:font-size="8.0pt" style:font-name="Arial"/>
    </style:style>
    <style:style style:family="table-cell" style:name="aaad3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8b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f5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24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edf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13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78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762da">
      <style:table-cell-properties fo:border="0.1pt solid #000000"/>
      <style:text-properties fo:color="#000000" fo:font-size="8.0pt" style:font-name="Arial"/>
    </style:style>
    <style:style style:family="table-cell" style:name="ac55c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96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8d20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1fc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c2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43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2cf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e55c">
      <style:table-cell-properties fo:border="0.1pt solid #000000"/>
      <style:text-properties fo:color="#000000" fo:font-size="8.0pt" style:font-name="Arial"/>
    </style:style>
    <style:style style:family="table-cell" style:name="a07f0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6d1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ff9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15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d5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bd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6391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5a11">
      <style:table-cell-properties fo:border="0.1pt solid #000000"/>
      <style:text-properties fo:color="#000000" fo:font-size="8.0pt" style:font-name="Arial"/>
    </style:style>
    <style:style style:family="table-cell" style:name="a67177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bc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fd5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45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23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1068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b53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3616">
      <style:table-cell-properties fo:border="0.1pt solid #000000"/>
      <style:text-properties fo:color="#000000" fo:font-size="8.0pt" style:font-name="Arial"/>
    </style:style>
    <style:style style:family="table-cell" style:name="aa7d40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de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c0b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d2a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071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0d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45f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71fb">
      <style:table-cell-properties fo:border="0.1pt solid #000000"/>
      <style:text-properties fo:color="#000000" fo:font-size="8.0pt" style:font-name="Arial"/>
    </style:style>
    <style:style style:family="table-cell" style:name="ae6bd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2a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2160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47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99b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2cc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42b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561d">
      <style:table-cell-properties fo:border="0.1pt solid #000000"/>
      <style:text-properties fo:color="#000000" fo:font-size="8.0pt" style:font-name="Arial"/>
    </style:style>
    <style:style style:family="table-cell" style:name="a56ea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32d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ff1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76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71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68c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c63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faee">
      <style:table-cell-properties fo:border="0.1pt solid #000000"/>
      <style:text-properties fo:color="#000000" fo:font-size="8.0pt" style:font-name="Arial"/>
    </style:style>
    <style:style style:family="table-cell" style:name="ad5b80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6fd0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76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1b7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a9e5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bf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467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7d48">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86cf12">
        <table:table-column table:style-name="ac53401"/>
        <table:table-row>
          <table:table-cell table:style-name="a04024f">
            <text:p>søgning afgivet <text:s text:c="1"/>2023-04-13</text:p>
          </table:table-cell>
        </table:table-row>
        <table:table-row>
          <table:table-cell table:style-name="a39dcf6">
            <text:p>Sagsstatus: afsluttet</text:p>
          </table:table-cell>
        </table:table-row>
        <table:table-row>
          <table:table-cell table:style-name="aa0906f"/>
        </table:table-row>
      </table:table>
      <table:table table:name="Table2" table:style-name="acd7ef9">
        <table:table-column table:number-columns-repeated="5" table:style-name="ade2904"/>
        <table:table-column table:style-name="ade2904"/>
        <table:table-column table:style-name="ade2904"/>
        <table:table-column table:style-name="ade2904"/>
        <table:table-row>
          <table:table-cell table:style-name="a9787bd">
            <text:p>Nr.</text:p>
          </table:table-cell>
          <table:table-cell table:style-name="abf2dc7">
            <text:p>Type</text:p>
          </table:table-cell>
          <table:table-cell table:style-name="a0007b3">
            <text:p>Navn</text:p>
          </table:table-cell>
          <table:table-cell table:style-name="a80c2a7">
            <text:p>cpr</text:p>
          </table:table-cell>
          <table:table-cell table:style-name="a0003dd">
            <text:p>Læge</text:p>
          </table:table-cell>
          <table:table-cell table:style-name="a9ab6e8">
            <text:p>Tiltrædes af</text:p>
          </table:table-cell>
          <table:table-cell table:style-name="a27dc0b">
            <text:p>Erklæring afgivet</text:p>
          </table:table-cell>
          <table:table-cell table:style-name="a067e07">
            <text:p>Psykolog</text:p>
          </table:table-cell>
        </table:table-row>
        <table:table-row>
          <table:table-cell table:style-name="a9c2156"/>
          <table:table-cell table:style-name="a243b7d"/>
          <table:table-cell table:style-name="a86eddf"/>
          <table:table-cell table:style-name="a4bae8c"/>
          <table:table-cell table:style-name="a78ac6a"/>
          <table:table-cell table:style-name="ad706f3"/>
          <table:table-cell table:style-name="add6155"/>
          <table:table-cell table:style-name="ae582ce"/>
        </table:table-row>
        <table:table-row>
          <table:table-cell table:style-name="a8d977a">
            <text:p>75</text:p>
          </table:table-cell>
          <table:table-cell table:style-name="a25a291">
            <text:p>PS</text:p>
          </table:table-cell>
          <table:table-cell table:style-name="a776078">
            <text:p>Mona Hansen</text:p>
          </table:table-cell>
          <table:table-cell table:style-name="ae00415">
            <text:p>0405576486</text:p>
          </table:table-cell>
          <table:table-cell table:style-name="a819677">
            <text:p>Harees, Farahna - lægekonsulent, speciallæge i psykiatri</text:p>
          </table:table-cell>
          <table:table-cell table:style-name="a3e4082">
            <text:p/>
          </table:table-cell>
          <table:table-cell table:style-name="a3ca0ef">
            <text:p>Afsluttet</text:p>
          </table:table-cell>
          <table:table-cell table:style-name="a8413a4">
            <text:p/>
          </table:table-cell>
        </table:table-row>
        <table:table-row>
          <table:table-cell table:style-name="aca7bb3">
            <text:p>50</text:p>
          </table:table-cell>
          <table:table-cell table:style-name="aa00141">
            <text:p>PS</text:p>
          </table:table-cell>
          <table:table-cell table:style-name="adae32f">
            <text:p>Mathias Eskildsen</text:p>
          </table:table-cell>
          <table:table-cell table:style-name="a7398bf">
            <text:p>0606854451</text:p>
          </table:table-cell>
          <table:table-cell table:style-name="adf818b">
            <text:p>Tøttrup, Jette - overlæge, speciallæge i psykiatri</text:p>
          </table:table-cell>
          <table:table-cell table:style-name="a948e77">
            <text:p/>
          </table:table-cell>
          <table:table-cell table:style-name="a5fc8eb">
            <text:p>Afsluttet</text:p>
          </table:table-cell>
          <table:table-cell table:style-name="ac7a10d">
            <text:p/>
          </table:table-cell>
        </table:table-row>
        <table:table-row>
          <table:table-cell table:style-name="a321881">
            <text:p>80</text:p>
          </table:table-cell>
          <table:table-cell table:style-name="aeab493">
            <text:p>PS</text:p>
          </table:table-cell>
          <table:table-cell table:style-name="aa38f29">
            <text:p>Mona Hedegård</text:p>
          </table:table-cell>
          <table:table-cell table:style-name="a83f459">
            <text:p>0704483732</text:p>
          </table:table-cell>
          <table:table-cell table:style-name="a4ac7b7">
            <text:p/>
          </table:table-cell>
          <table:table-cell table:style-name="a0367b3">
            <text:p/>
          </table:table-cell>
          <table:table-cell table:style-name="ac0e836">
            <text:p>Afsluttet</text:p>
          </table:table-cell>
          <table:table-cell table:style-name="ab27516">
            <text:p/>
          </table:table-cell>
        </table:table-row>
        <table:table-row>
          <table:table-cell table:style-name="ab92ec5">
            <text:p>83</text:p>
          </table:table-cell>
          <table:table-cell table:style-name="ac4924f">
            <text:p>PS</text:p>
          </table:table-cell>
          <table:table-cell table:style-name="aaebbd2">
            <text:p>Hans Hermansen</text:p>
          </table:table-cell>
          <table:table-cell table:style-name="a6517bc">
            <text:p>1404869607</text:p>
          </table:table-cell>
          <table:table-cell table:style-name="a7c02d1">
            <text:p/>
          </table:table-cell>
          <table:table-cell table:style-name="a9317c2">
            <text:p/>
          </table:table-cell>
          <table:table-cell table:style-name="ad447bb">
            <text:p>Afsluttet</text:p>
          </table:table-cell>
          <table:table-cell table:style-name="a2c7af3">
            <text:p/>
          </table:table-cell>
        </table:table-row>
        <table:table-row>
          <table:table-cell table:style-name="a8720fd">
            <text:p>60</text:p>
          </table:table-cell>
          <table:table-cell table:style-name="a78b497">
            <text:p>PS</text:p>
          </table:table-cell>
          <table:table-cell table:style-name="a455a85">
            <text:p>Hans Eskildsen</text:p>
          </table:table-cell>
          <table:table-cell table:style-name="a886a8c">
            <text:p>2708847895</text:p>
          </table:table-cell>
          <table:table-cell table:style-name="af7102c">
            <text:p/>
          </table:table-cell>
          <table:table-cell table:style-name="ac5a6b1">
            <text:p/>
          </table:table-cell>
          <table:table-cell table:style-name="a91a2ba">
            <text:p>Afsluttet</text:p>
          </table:table-cell>
          <table:table-cell table:style-name="a76d74f">
            <text:p/>
          </table:table-cell>
        </table:table-row>
        <table:table-row>
          <table:table-cell table:style-name="a528c0d">
            <text:p>52</text:p>
          </table:table-cell>
          <table:table-cell table:style-name="ad14739">
            <text:p>PS</text:p>
          </table:table-cell>
          <table:table-cell table:style-name="ab74c59">
            <text:p>Mogens Nielsen</text:p>
          </table:table-cell>
          <table:table-cell table:style-name="a8d0d90">
            <text:p>0903687777</text:p>
          </table:table-cell>
          <table:table-cell table:style-name="af3f374">
            <text:p/>
          </table:table-cell>
          <table:table-cell table:style-name="af80062">
            <text:p/>
          </table:table-cell>
          <table:table-cell table:style-name="ad66696">
            <text:p>Afsluttet</text:p>
          </table:table-cell>
          <table:table-cell table:style-name="af6349d">
            <text:p/>
          </table:table-cell>
        </table:table-row>
        <table:table-row>
          <table:table-cell table:style-name="a55b413">
            <text:p>36</text:p>
          </table:table-cell>
          <table:table-cell table:style-name="a9848fe">
            <text:p>PS</text:p>
          </table:table-cell>
          <table:table-cell table:style-name="ab7cbf4">
            <text:p>Kurt Madsen</text:p>
          </table:table-cell>
          <table:table-cell table:style-name="a4960fb">
            <text:p>0511471645</text:p>
          </table:table-cell>
          <table:table-cell table:style-name="a860d70">
            <text:p>Harees, Farahna - lægekonsulent, speciallæge i psykiatri</text:p>
          </table:table-cell>
          <table:table-cell table:style-name="a9b8fdb">
            <text:p/>
          </table:table-cell>
          <table:table-cell table:style-name="a1786a9">
            <text:p>Afsluttet</text:p>
          </table:table-cell>
          <table:table-cell table:style-name="a68c368">
            <text:p/>
          </table:table-cell>
        </table:table-row>
        <table:table-row>
          <table:table-cell table:style-name="a77c537">
            <text:p>31</text:p>
          </table:table-cell>
          <table:table-cell table:style-name="a0b40fa">
            <text:p>PS</text:p>
          </table:table-cell>
          <table:table-cell table:style-name="ae7eb57">
            <text:p>Ulla Eskildsen</text:p>
          </table:table-cell>
          <table:table-cell table:style-name="a82bec0">
            <text:p>1608450670</text:p>
          </table:table-cell>
          <table:table-cell table:style-name="a3ea6d9">
            <text:p>Harees, Farahna - lægekonsulent, speciallæge i psykiatri</text:p>
          </table:table-cell>
          <table:table-cell table:style-name="a4d4e91">
            <text:p/>
          </table:table-cell>
          <table:table-cell table:style-name="a6fe412">
            <text:p>Afsluttet</text:p>
          </table:table-cell>
          <table:table-cell table:style-name="adceea0">
            <text:p/>
          </table:table-cell>
        </table:table-row>
        <table:table-row>
          <table:table-cell table:style-name="a87e879">
            <text:p>33</text:p>
          </table:table-cell>
          <table:table-cell table:style-name="ae6e7dc">
            <text:p>PS</text:p>
          </table:table-cell>
          <table:table-cell table:style-name="a3c25b4">
            <text:p>Mogens Østergaard</text:p>
          </table:table-cell>
          <table:table-cell table:style-name="a4868e4">
            <text:p>1506726613</text:p>
          </table:table-cell>
          <table:table-cell table:style-name="ac7cf2b">
            <text:p>Harees, Farahna - lægekonsulent, speciallæge i psykiatri</text:p>
          </table:table-cell>
          <table:table-cell table:style-name="a0f47c2">
            <text:p/>
          </table:table-cell>
          <table:table-cell table:style-name="a584985">
            <text:p>Afsluttet</text:p>
          </table:table-cell>
          <table:table-cell table:style-name="afdc3ee">
            <text:p/>
          </table:table-cell>
        </table:table-row>
        <table:table-row>
          <table:table-cell table:style-name="aa72c84">
            <text:p>46</text:p>
          </table:table-cell>
          <table:table-cell table:style-name="aefc540">
            <text:p>PS</text:p>
          </table:table-cell>
          <table:table-cell table:style-name="a2a0535">
            <text:p>Emma Frost</text:p>
          </table:table-cell>
          <table:table-cell table:style-name="a26abc7">
            <text:p>1409632290</text:p>
          </table:table-cell>
          <table:table-cell table:style-name="a348f74">
            <text:p/>
          </table:table-cell>
          <table:table-cell table:style-name="a298fba">
            <text:p/>
          </table:table-cell>
          <table:table-cell table:style-name="a95fb1c">
            <text:p>Afsluttet</text:p>
          </table:table-cell>
          <table:table-cell table:style-name="a8a1001">
            <text:p/>
          </table:table-cell>
        </table:table-row>
        <table:table-row>
          <table:table-cell table:style-name="a3e427b">
            <text:p>37</text:p>
          </table:table-cell>
          <table:table-cell table:style-name="a1cc0fd">
            <text:p>PS</text:p>
          </table:table-cell>
          <table:table-cell table:style-name="acadcd5">
            <text:p>Hans Vestergaard</text:p>
          </table:table-cell>
          <table:table-cell table:style-name="aa7347b">
            <text:p>0203495283</text:p>
          </table:table-cell>
          <table:table-cell table:style-name="a037121">
            <text:p>Harees, Farahna - lægekonsulent, speciallæge i psykiatri</text:p>
          </table:table-cell>
          <table:table-cell table:style-name="a77af2b">
            <text:p/>
          </table:table-cell>
          <table:table-cell table:style-name="a2cda26">
            <text:p>Afsluttet</text:p>
          </table:table-cell>
          <table:table-cell table:style-name="a0b2ee2">
            <text:p/>
          </table:table-cell>
        </table:table-row>
        <table:table-row>
          <table:table-cell table:style-name="a1c0eca">
            <text:p>74</text:p>
          </table:table-cell>
          <table:table-cell table:style-name="ac8a870">
            <text:p>PS</text:p>
          </table:table-cell>
          <table:table-cell table:style-name="a60962e">
            <text:p>Mathias Eskildsen</text:p>
          </table:table-cell>
          <table:table-cell table:style-name="ad39b10">
            <text:p>0504859075</text:p>
          </table:table-cell>
          <table:table-cell table:style-name="a1058d0">
            <text:p>Harees, Farahna - lægekonsulent, speciallæge i psykiatri</text:p>
          </table:table-cell>
          <table:table-cell table:style-name="a27827c">
            <text:p/>
          </table:table-cell>
          <table:table-cell table:style-name="a621cf5">
            <text:p>Afsluttet</text:p>
          </table:table-cell>
          <table:table-cell table:style-name="a20903c">
            <text:p/>
          </table:table-cell>
        </table:table-row>
        <table:table-row>
          <table:table-cell table:style-name="a9a0df6">
            <text:p>34</text:p>
          </table:table-cell>
          <table:table-cell table:style-name="a8fa7da">
            <text:p>PS</text:p>
          </table:table-cell>
          <table:table-cell table:style-name="ae99340">
            <text:p>Kurt Madsen</text:p>
          </table:table-cell>
          <table:table-cell table:style-name="aaf20e8">
            <text:p>1503515521</text:p>
          </table:table-cell>
          <table:table-cell table:style-name="af2b522">
            <text:p>Harees, Farahna - lægekonsulent, speciallæge i psykiatri</text:p>
          </table:table-cell>
          <table:table-cell table:style-name="a2e8d14">
            <text:p/>
          </table:table-cell>
          <table:table-cell table:style-name="a1c9ab4">
            <text:p>Afsluttet</text:p>
          </table:table-cell>
          <table:table-cell table:style-name="af4efb6">
            <text:p/>
          </table:table-cell>
        </table:table-row>
        <table:table-row>
          <table:table-cell table:style-name="ae38d6f">
            <text:p>38</text:p>
          </table:table-cell>
          <table:table-cell table:style-name="abdb7a0">
            <text:p>PS</text:p>
          </table:table-cell>
          <table:table-cell table:style-name="ab0a44f">
            <text:p>Mathilde Hansen</text:p>
          </table:table-cell>
          <table:table-cell table:style-name="adca300">
            <text:p>2304660596</text:p>
          </table:table-cell>
          <table:table-cell table:style-name="a85018a">
            <text:p>Harees, Farahna - lægekonsulent, speciallæge i psykiatri</text:p>
          </table:table-cell>
          <table:table-cell table:style-name="afac0ac">
            <text:p/>
          </table:table-cell>
          <table:table-cell table:style-name="a2fab31">
            <text:p>Afsluttet</text:p>
          </table:table-cell>
          <table:table-cell table:style-name="ab2413e">
            <text:p/>
          </table:table-cell>
        </table:table-row>
        <table:table-row>
          <table:table-cell table:style-name="abcb85e">
            <text:p>47</text:p>
          </table:table-cell>
          <table:table-cell table:style-name="a72fda7">
            <text:p>PS</text:p>
          </table:table-cell>
          <table:table-cell table:style-name="a0611ac">
            <text:p>Jens Nielsen</text:p>
          </table:table-cell>
          <table:table-cell table:style-name="ae5c047">
            <text:p>2602683245</text:p>
          </table:table-cell>
          <table:table-cell table:style-name="a929d19">
            <text:p/>
          </table:table-cell>
          <table:table-cell table:style-name="a23b8a7">
            <text:p/>
          </table:table-cell>
          <table:table-cell table:style-name="a5d9aaf">
            <text:p>Afsluttet</text:p>
          </table:table-cell>
          <table:table-cell table:style-name="a095157">
            <text:p/>
          </table:table-cell>
        </table:table-row>
        <table:table-row>
          <table:table-cell table:style-name="a667874">
            <text:p>40</text:p>
          </table:table-cell>
          <table:table-cell table:style-name="ae3229c">
            <text:p>PS</text:p>
          </table:table-cell>
          <table:table-cell table:style-name="a8eb980">
            <text:p>Emma Vestergaard</text:p>
          </table:table-cell>
          <table:table-cell table:style-name="ad833ea">
            <text:p>0311795592</text:p>
          </table:table-cell>
          <table:table-cell table:style-name="ae8f554">
            <text:p>Harees, Farahna - lægekonsulent, speciallæge i psykiatri</text:p>
          </table:table-cell>
          <table:table-cell table:style-name="a216954">
            <text:p/>
          </table:table-cell>
          <table:table-cell table:style-name="a1eb1b9">
            <text:p>Afsluttet</text:p>
          </table:table-cell>
          <table:table-cell table:style-name="a22196b">
            <text:p/>
          </table:table-cell>
        </table:table-row>
        <table:table-row>
          <table:table-cell table:style-name="a7c2aba">
            <text:p>39</text:p>
          </table:table-cell>
          <table:table-cell table:style-name="a549b49">
            <text:p>PS</text:p>
          </table:table-cell>
          <table:table-cell table:style-name="ad641a5">
            <text:p>Kurt Fischer</text:p>
          </table:table-cell>
          <table:table-cell table:style-name="a2e63a8">
            <text:p>0507428369</text:p>
          </table:table-cell>
          <table:table-cell table:style-name="a490501">
            <text:p>Harees, Farahna - lægekonsulent, speciallæge i psykiatri</text:p>
          </table:table-cell>
          <table:table-cell table:style-name="a4d4349">
            <text:p/>
          </table:table-cell>
          <table:table-cell table:style-name="a79d0ea">
            <text:p>Afsluttet</text:p>
          </table:table-cell>
          <table:table-cell table:style-name="a89c81e">
            <text:p/>
          </table:table-cell>
        </table:table-row>
        <table:table-row>
          <table:table-cell table:style-name="ae82866">
            <text:p>45</text:p>
          </table:table-cell>
          <table:table-cell table:style-name="ac4e5e2">
            <text:p>PS</text:p>
          </table:table-cell>
          <table:table-cell table:style-name="a115d75">
            <text:p>Kurt Nielsen</text:p>
          </table:table-cell>
          <table:table-cell table:style-name="a38221a">
            <text:p>0702775379</text:p>
          </table:table-cell>
          <table:table-cell table:style-name="af626f4">
            <text:p>Harees, Farahna - lægekonsulent, speciallæge i psykiatri</text:p>
          </table:table-cell>
          <table:table-cell table:style-name="ab2caad">
            <text:p/>
          </table:table-cell>
          <table:table-cell table:style-name="a7ba0c7">
            <text:p>Afsluttet</text:p>
          </table:table-cell>
          <table:table-cell table:style-name="af37d99">
            <text:p/>
          </table:table-cell>
        </table:table-row>
        <table:table-row>
          <table:table-cell table:style-name="a4c23a6">
            <text:p>56</text:p>
          </table:table-cell>
          <table:table-cell table:style-name="a56bb59">
            <text:p>PS</text:p>
          </table:table-cell>
          <table:table-cell table:style-name="a3d2790">
            <text:p>Kurt Østergaard</text:p>
          </table:table-cell>
          <table:table-cell table:style-name="a78a50d">
            <text:p>2206703929</text:p>
          </table:table-cell>
          <table:table-cell table:style-name="adf3ce8">
            <text:p/>
          </table:table-cell>
          <table:table-cell table:style-name="a74a28e">
            <text:p/>
          </table:table-cell>
          <table:table-cell table:style-name="a19558a">
            <text:p>Afsluttet</text:p>
          </table:table-cell>
          <table:table-cell table:style-name="ae0bbdd">
            <text:p/>
          </table:table-cell>
        </table:table-row>
        <table:table-row>
          <table:table-cell table:style-name="a7a586d">
            <text:p>44</text:p>
          </table:table-cell>
          <table:table-cell table:style-name="aef34a6">
            <text:p>PS</text:p>
          </table:table-cell>
          <table:table-cell table:style-name="a088fb9">
            <text:p>Mathias Hermansen</text:p>
          </table:table-cell>
          <table:table-cell table:style-name="aaeafcb">
            <text:p>0202805085</text:p>
          </table:table-cell>
          <table:table-cell table:style-name="a9f2a45">
            <text:p>Harees, Farahna - lægekonsulent, speciallæge i psykiatri</text:p>
          </table:table-cell>
          <table:table-cell table:style-name="acb0c2a">
            <text:p/>
          </table:table-cell>
          <table:table-cell table:style-name="a8c06ef">
            <text:p>Afsluttet</text:p>
          </table:table-cell>
          <table:table-cell table:style-name="a868b13">
            <text:p/>
          </table:table-cell>
        </table:table-row>
        <table:table-row>
          <table:table-cell table:style-name="adc914e">
            <text:p>51</text:p>
          </table:table-cell>
          <table:table-cell table:style-name="aa6e423">
            <text:p>PS</text:p>
          </table:table-cell>
          <table:table-cell table:style-name="a34dca0">
            <text:p>Ingrid Fischer</text:p>
          </table:table-cell>
          <table:table-cell table:style-name="a7bf16f">
            <text:p>1002715390</text:p>
          </table:table-cell>
          <table:table-cell table:style-name="ad1a2f5">
            <text:p/>
          </table:table-cell>
          <table:table-cell table:style-name="ae0da42">
            <text:p/>
          </table:table-cell>
          <table:table-cell table:style-name="a719c0a">
            <text:p>Afsluttet</text:p>
          </table:table-cell>
          <table:table-cell table:style-name="a8451da">
            <text:p/>
          </table:table-cell>
        </table:table-row>
        <table:table-row>
          <table:table-cell table:style-name="ae60040">
            <text:p>57</text:p>
          </table:table-cell>
          <table:table-cell table:style-name="af3e2cf">
            <text:p>PS</text:p>
          </table:table-cell>
          <table:table-cell table:style-name="a5a41ae">
            <text:p>Hans Hansen</text:p>
          </table:table-cell>
          <table:table-cell table:style-name="ae09730">
            <text:p>0809779747</text:p>
          </table:table-cell>
          <table:table-cell table:style-name="a794e34">
            <text:p/>
          </table:table-cell>
          <table:table-cell table:style-name="a13d86d">
            <text:p/>
          </table:table-cell>
          <table:table-cell table:style-name="a404b13">
            <text:p>Afsluttet</text:p>
          </table:table-cell>
          <table:table-cell table:style-name="a416198">
            <text:p/>
          </table:table-cell>
        </table:table-row>
        <table:table-row>
          <table:table-cell table:style-name="aeceb77">
            <text:p>81</text:p>
          </table:table-cell>
          <table:table-cell table:style-name="ab1d1a9">
            <text:p>PS</text:p>
          </table:table-cell>
          <table:table-cell table:style-name="a3d88de">
            <text:p>Niels Frost</text:p>
          </table:table-cell>
          <table:table-cell table:style-name="a0012b9">
            <text:p>1703629845</text:p>
          </table:table-cell>
          <table:table-cell table:style-name="a743d5e">
            <text:p/>
          </table:table-cell>
          <table:table-cell table:style-name="a5da663">
            <text:p/>
          </table:table-cell>
          <table:table-cell table:style-name="ad9ad37">
            <text:p>Afsluttet</text:p>
          </table:table-cell>
          <table:table-cell table:style-name="a0636cc">
            <text:p/>
          </table:table-cell>
        </table:table-row>
        <table:table-row>
          <table:table-cell table:style-name="a092e2e">
            <text:p>49</text:p>
          </table:table-cell>
          <table:table-cell table:style-name="a6ccef9">
            <text:p>PS</text:p>
          </table:table-cell>
          <table:table-cell table:style-name="a23d086">
            <text:p>Mogens Nielsen</text:p>
          </table:table-cell>
          <table:table-cell table:style-name="ae4146f">
            <text:p>2708777887</text:p>
          </table:table-cell>
          <table:table-cell table:style-name="a3bb6c3">
            <text:p/>
          </table:table-cell>
          <table:table-cell table:style-name="aea074f">
            <text:p/>
          </table:table-cell>
          <table:table-cell table:style-name="a4a666c">
            <text:p>Afsluttet</text:p>
          </table:table-cell>
          <table:table-cell table:style-name="a266d5a">
            <text:p/>
          </table:table-cell>
        </table:table-row>
        <table:table-row>
          <table:table-cell table:style-name="ad48d78">
            <text:p>54</text:p>
          </table:table-cell>
          <table:table-cell table:style-name="a945fa1">
            <text:p>PS</text:p>
          </table:table-cell>
          <table:table-cell table:style-name="ad15d28">
            <text:p>Ulla Nielsen</text:p>
          </table:table-cell>
          <table:table-cell table:style-name="a32b9cb">
            <text:p>0410494792</text:p>
          </table:table-cell>
          <table:table-cell table:style-name="a6c546f">
            <text:p/>
          </table:table-cell>
          <table:table-cell table:style-name="a1fa522">
            <text:p/>
          </table:table-cell>
          <table:table-cell table:style-name="a036138">
            <text:p>Afsluttet</text:p>
          </table:table-cell>
          <table:table-cell table:style-name="ad068df">
            <text:p/>
          </table:table-cell>
        </table:table-row>
        <table:table-row>
          <table:table-cell table:style-name="a29e116">
            <text:p>48</text:p>
          </table:table-cell>
          <table:table-cell table:style-name="a7b4c71">
            <text:p>PS</text:p>
          </table:table-cell>
          <table:table-cell table:style-name="a207f48">
            <text:p>Niels Hansen</text:p>
          </table:table-cell>
          <table:table-cell table:style-name="a0cefa2">
            <text:p>2007677591</text:p>
          </table:table-cell>
          <table:table-cell table:style-name="ad37706">
            <text:p/>
          </table:table-cell>
          <table:table-cell table:style-name="aa047dc">
            <text:p/>
          </table:table-cell>
          <table:table-cell table:style-name="a199e87">
            <text:p>Afsluttet</text:p>
          </table:table-cell>
          <table:table-cell table:style-name="a57b0ff">
            <text:p/>
          </table:table-cell>
        </table:table-row>
        <table:table-row>
          <table:table-cell table:style-name="a40103c">
            <text:p>76</text:p>
          </table:table-cell>
          <table:table-cell table:style-name="a497373">
            <text:p>PS</text:p>
          </table:table-cell>
          <table:table-cell table:style-name="a5d8d31">
            <text:p>Kurt Madsen</text:p>
          </table:table-cell>
          <table:table-cell table:style-name="a8a0879">
            <text:p>1509682497</text:p>
          </table:table-cell>
          <table:table-cell table:style-name="aff0c89">
            <text:p>Harees, Farahna - lægekonsulent, speciallæge i psykiatri</text:p>
          </table:table-cell>
          <table:table-cell table:style-name="a0580e6">
            <text:p/>
          </table:table-cell>
          <table:table-cell table:style-name="a59997d">
            <text:p>Afsluttet</text:p>
          </table:table-cell>
          <table:table-cell table:style-name="a0f01b5">
            <text:p/>
          </table:table-cell>
        </table:table-row>
        <table:table-row>
          <table:table-cell table:style-name="abde26c">
            <text:p>79</text:p>
          </table:table-cell>
          <table:table-cell table:style-name="a448d3c">
            <text:p>PS</text:p>
          </table:table-cell>
          <table:table-cell table:style-name="ad4f0d0">
            <text:p>Mathilde Frost</text:p>
          </table:table-cell>
          <table:table-cell table:style-name="a8586d5">
            <text:p>0806672974</text:p>
          </table:table-cell>
          <table:table-cell table:style-name="a8cab2a">
            <text:p/>
          </table:table-cell>
          <table:table-cell table:style-name="a5eca55">
            <text:p/>
          </table:table-cell>
          <table:table-cell table:style-name="a3b3f43">
            <text:p>Afsluttet</text:p>
          </table:table-cell>
          <table:table-cell table:style-name="a070fa3">
            <text:p/>
          </table:table-cell>
        </table:table-row>
        <table:table-row>
          <table:table-cell table:style-name="aa3a440">
            <text:p>55</text:p>
          </table:table-cell>
          <table:table-cell table:style-name="a14e63c">
            <text:p>PS</text:p>
          </table:table-cell>
          <table:table-cell table:style-name="a40497d">
            <text:p>Mathias Madsen</text:p>
          </table:table-cell>
          <table:table-cell table:style-name="ab41b8a">
            <text:p>0209886161</text:p>
          </table:table-cell>
          <table:table-cell table:style-name="ab5001f">
            <text:p/>
          </table:table-cell>
          <table:table-cell table:style-name="ab61a48">
            <text:p/>
          </table:table-cell>
          <table:table-cell table:style-name="a037ad5">
            <text:p>Afsluttet</text:p>
          </table:table-cell>
          <table:table-cell table:style-name="a470062">
            <text:p/>
          </table:table-cell>
        </table:table-row>
        <table:table-row>
          <table:table-cell table:style-name="a27a03b">
            <text:p>82</text:p>
          </table:table-cell>
          <table:table-cell table:style-name="aeb0c0f">
            <text:p>PS</text:p>
          </table:table-cell>
          <table:table-cell table:style-name="affa1cd">
            <text:p>Emma Madsen</text:p>
          </table:table-cell>
          <table:table-cell table:style-name="a34d80b">
            <text:p>2409578542</text:p>
          </table:table-cell>
          <table:table-cell table:style-name="ad0926c">
            <text:p/>
          </table:table-cell>
          <table:table-cell table:style-name="a1fea2d">
            <text:p/>
          </table:table-cell>
          <table:table-cell table:style-name="aa054d6">
            <text:p>Afsluttet</text:p>
          </table:table-cell>
          <table:table-cell table:style-name="a5396d4">
            <text:p/>
          </table:table-cell>
        </table:table-row>
        <table:table-row>
          <table:table-cell table:style-name="ae26b99">
            <text:p>41</text:p>
          </table:table-cell>
          <table:table-cell table:style-name="aab6ece">
            <text:p>PS</text:p>
          </table:table-cell>
          <table:table-cell table:style-name="a4bb965">
            <text:p>Lykke Hermansen</text:p>
          </table:table-cell>
          <table:table-cell table:style-name="a1394bb">
            <text:p>2702565342</text:p>
          </table:table-cell>
          <table:table-cell table:style-name="ad2d9b9">
            <text:p>Harees, Farahna - lægekonsulent, speciallæge i psykiatri</text:p>
          </table:table-cell>
          <table:table-cell table:style-name="a1bb218">
            <text:p/>
          </table:table-cell>
          <table:table-cell table:style-name="a0ca75d">
            <text:p>Afsluttet</text:p>
          </table:table-cell>
          <table:table-cell table:style-name="a1a1370">
            <text:p/>
          </table:table-cell>
        </table:table-row>
        <table:table-row>
          <table:table-cell table:style-name="ae8071f">
            <text:p>59</text:p>
          </table:table-cell>
          <table:table-cell table:style-name="a84f659">
            <text:p>PS</text:p>
          </table:table-cell>
          <table:table-cell table:style-name="ace62c3">
            <text:p>Mona Madsen</text:p>
          </table:table-cell>
          <table:table-cell table:style-name="a718b39">
            <text:p>2211716172</text:p>
          </table:table-cell>
          <table:table-cell table:style-name="af8a91d">
            <text:p/>
          </table:table-cell>
          <table:table-cell table:style-name="a49d80d">
            <text:p/>
          </table:table-cell>
          <table:table-cell table:style-name="a4865c7">
            <text:p>Afsluttet</text:p>
          </table:table-cell>
          <table:table-cell table:style-name="a93c895">
            <text:p/>
          </table:table-cell>
        </table:table-row>
        <table:table-row>
          <table:table-cell table:style-name="aaad3ed">
            <text:p>42</text:p>
          </table:table-cell>
          <table:table-cell table:style-name="a978bae">
            <text:p>PS</text:p>
          </table:table-cell>
          <table:table-cell table:style-name="a4df517">
            <text:p>Ulla Madsen</text:p>
          </table:table-cell>
          <table:table-cell table:style-name="a4924b9">
            <text:p>1802801426</text:p>
          </table:table-cell>
          <table:table-cell table:style-name="a26edf3">
            <text:p>Harees, Farahna - lægekonsulent, speciallæge i psykiatri</text:p>
          </table:table-cell>
          <table:table-cell table:style-name="abc1356">
            <text:p/>
          </table:table-cell>
          <table:table-cell table:style-name="a327887">
            <text:p>Afsluttet</text:p>
          </table:table-cell>
          <table:table-cell table:style-name="ab762da">
            <text:p/>
          </table:table-cell>
        </table:table-row>
        <table:table-row>
          <table:table-cell table:style-name="ac55c4a">
            <text:p>77</text:p>
          </table:table-cell>
          <table:table-cell table:style-name="a8f9636">
            <text:p>PS</text:p>
          </table:table-cell>
          <table:table-cell table:style-name="a58d20a">
            <text:p>Clara Hermansen</text:p>
          </table:table-cell>
          <table:table-cell table:style-name="a01fc4a">
            <text:p>1904499318</text:p>
          </table:table-cell>
          <table:table-cell table:style-name="ab6c2a4">
            <text:p>Harees, Farahna - lægekonsulent, speciallæge i psykiatri</text:p>
          </table:table-cell>
          <table:table-cell table:style-name="a6543d0">
            <text:p/>
          </table:table-cell>
          <table:table-cell table:style-name="ad12cf3">
            <text:p>Afsluttet</text:p>
          </table:table-cell>
          <table:table-cell table:style-name="a8ce55c">
            <text:p/>
          </table:table-cell>
        </table:table-row>
        <table:table-row>
          <table:table-cell table:style-name="a07f077">
            <text:p>53</text:p>
          </table:table-cell>
          <table:table-cell table:style-name="a5b6d15">
            <text:p>PS</text:p>
          </table:table-cell>
          <table:table-cell table:style-name="a1dff94">
            <text:p>Lykke Frost</text:p>
          </table:table-cell>
          <table:table-cell table:style-name="a4a152a">
            <text:p>1009767852</text:p>
          </table:table-cell>
          <table:table-cell table:style-name="aabd57c">
            <text:p/>
          </table:table-cell>
          <table:table-cell table:style-name="a6dbd3b">
            <text:p/>
          </table:table-cell>
          <table:table-cell table:style-name="ad63919">
            <text:p>Afsluttet</text:p>
          </table:table-cell>
          <table:table-cell table:style-name="a795a11">
            <text:p/>
          </table:table-cell>
        </table:table-row>
        <table:table-row>
          <table:table-cell table:style-name="a67177f">
            <text:p>78</text:p>
          </table:table-cell>
          <table:table-cell table:style-name="a5fbc7a">
            <text:p>PS</text:p>
          </table:table-cell>
          <table:table-cell table:style-name="adfd5cb">
            <text:p>Hans Fischer</text:p>
          </table:table-cell>
          <table:table-cell table:style-name="ae94518">
            <text:p>1904565211</text:p>
          </table:table-cell>
          <table:table-cell table:style-name="a92237a">
            <text:p>Harees, Farahna - lægekonsulent, speciallæge i psykiatri</text:p>
          </table:table-cell>
          <table:table-cell table:style-name="a710688">
            <text:p/>
          </table:table-cell>
          <table:table-cell table:style-name="a6b538b">
            <text:p>Afsluttet</text:p>
          </table:table-cell>
          <table:table-cell table:style-name="a173616">
            <text:p/>
          </table:table-cell>
        </table:table-row>
        <table:table-row>
          <table:table-cell table:style-name="aa7d406">
            <text:p>32</text:p>
          </table:table-cell>
          <table:table-cell table:style-name="acfdeef">
            <text:p>PS</text:p>
          </table:table-cell>
          <table:table-cell table:style-name="aadc0b1">
            <text:p>Dan Fischer</text:p>
          </table:table-cell>
          <table:table-cell table:style-name="a83d2a5">
            <text:p>0905572723</text:p>
          </table:table-cell>
          <table:table-cell table:style-name="a80071a">
            <text:p>Harees, Farahna - lægekonsulent, speciallæge i psykiatri</text:p>
          </table:table-cell>
          <table:table-cell table:style-name="aea0d2e">
            <text:p/>
          </table:table-cell>
          <table:table-cell table:style-name="a945f30">
            <text:p>Afsluttet</text:p>
          </table:table-cell>
          <table:table-cell table:style-name="a3071fb">
            <text:p/>
          </table:table-cell>
        </table:table-row>
        <table:table-row>
          <table:table-cell table:style-name="ae6bd18">
            <text:p>58</text:p>
          </table:table-cell>
          <table:table-cell table:style-name="a0f2aac">
            <text:p>PS</text:p>
          </table:table-cell>
          <table:table-cell table:style-name="a521608">
            <text:p>Clara Fischer</text:p>
          </table:table-cell>
          <table:table-cell table:style-name="a81477a">
            <text:p>0702623142</text:p>
          </table:table-cell>
          <table:table-cell table:style-name="af99b2d">
            <text:p/>
          </table:table-cell>
          <table:table-cell table:style-name="a52cc78">
            <text:p/>
          </table:table-cell>
          <table:table-cell table:style-name="ab42b13">
            <text:p>Afsluttet</text:p>
          </table:table-cell>
          <table:table-cell table:style-name="aaf561d">
            <text:p/>
          </table:table-cell>
        </table:table-row>
        <table:table-row>
          <table:table-cell table:style-name="a56eafd">
            <text:p>43</text:p>
          </table:table-cell>
          <table:table-cell table:style-name="a4032df">
            <text:p>PS</text:p>
          </table:table-cell>
          <table:table-cell table:style-name="aa0ff19">
            <text:p>Jens Hermansen</text:p>
          </table:table-cell>
          <table:table-cell table:style-name="a8c76b5">
            <text:p>0506669331</text:p>
          </table:table-cell>
          <table:table-cell table:style-name="ab271a3">
            <text:p>Harees, Farahna - lægekonsulent, speciallæge i psykiatri</text:p>
          </table:table-cell>
          <table:table-cell table:style-name="abc68cf">
            <text:p/>
          </table:table-cell>
          <table:table-cell table:style-name="a00c638">
            <text:p>Afsluttet</text:p>
          </table:table-cell>
          <table:table-cell table:style-name="a9afaee">
            <text:p/>
          </table:table-cell>
        </table:table-row>
        <table:table-row>
          <table:table-cell table:style-name="ad5b802">
            <text:p>35</text:p>
          </table:table-cell>
          <table:table-cell table:style-name="a66fd07">
            <text:p>PS</text:p>
          </table:table-cell>
          <table:table-cell table:style-name="a957692">
            <text:p>Mogens Madsen</text:p>
          </table:table-cell>
          <table:table-cell table:style-name="a61b732">
            <text:p>2111489313</text:p>
          </table:table-cell>
          <table:table-cell table:style-name="a6a9e5f">
            <text:p>Harees, Farahna - lægekonsulent, speciallæge i psykiatri</text:p>
          </table:table-cell>
          <table:table-cell table:style-name="ae4bf17">
            <text:p/>
          </table:table-cell>
          <table:table-cell table:style-name="af46763">
            <text:p>Afsluttet</text:p>
          </table:table-cell>
          <table:table-cell table:style-name="a747d48">
            <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3-04-13T13:37:04</dc:date>
    <meta:editing-cycles>1</meta:editing-cycles>
    <meta:editing-duration>PT2.953S</meta:editing-duration>
    <meta:initial-creator>fhp</meta:initial-creator>
    <meta:creation-date>2023-04-13T13:37:01</meta:creation-date>
    <dc:language>en</dc:language>
  </office:meta>
</office:document-meta>
</file>